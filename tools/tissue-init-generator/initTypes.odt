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A000003DB06EEA516.png" manifest:media-type="image/png"/>
  <manifest:file-entry manifest:full-path="Pictures/100000000000062A000003DB9255E3E2.png" manifest:media-type="image/png"/>
  <manifest:file-entry manifest:full-path="Pictures/100000000000062A000003DBBA3E2328.png" manifest:media-type="image/png"/>
  <manifest:file-entry manifest:full-path="Pictures/100000000000062A000003DBDF7C4F8A.png" manifest:media-type="image/png"/>
  <manifest:file-entry manifest:full-path="Pictures/100000000000062A000003DBEBB2703D.png" manifest:media-type="image/png"/>
  <manifest:file-entry manifest:full-path="Pictures/100000000000062A000003DBC5EDD753.png" manifest:media-type="image/png"/>
  <manifest:file-entry manifest:full-path="Pictures/100000000000062A000003DB6B6EC4B6.png" manifest:media-type="image/png"/>
  <manifest:file-entry manifest:full-path="Pictures/100000000000062A000003DBBFE868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8e8" officeooo:paragraph-rsid="000c38e8"/>
    </style:style>
    <style:style style:name="P2" style:family="paragraph" style:parent-style-name="Standard">
      <style:text-properties officeooo:rsid="000c38e8" officeooo:paragraph-rsid="000fcea2"/>
    </style:style>
    <style:style style:name="P3" style:family="paragraph" style:parent-style-name="Standard">
      <style:text-properties officeooo:rsid="000c38e8" officeooo:paragraph-rsid="000cd949"/>
    </style:style>
    <style:style style:name="P4" style:family="paragraph" style:parent-style-name="Standard">
      <style:text-properties officeooo:rsid="000c38e8" officeooo:paragraph-rsid="0013e25b"/>
    </style:style>
    <style:style style:name="P5" style:family="paragraph" style:parent-style-name="Standard">
      <style:text-properties officeooo:rsid="000fcea2" officeooo:paragraph-rsid="000fcea2"/>
    </style:style>
    <style:style style:name="P6" style:family="paragraph" style:parent-style-name="Standard">
      <style:text-properties officeooo:rsid="000cd949" officeooo:paragraph-rsid="000fcea2"/>
    </style:style>
    <style:style style:name="P7" style:family="paragraph" style:parent-style-name="Standard">
      <style:text-properties officeooo:rsid="0010b57d" officeooo:paragraph-rsid="0010b57d"/>
    </style:style>
    <style:style style:name="P8" style:family="paragraph" style:parent-style-name="Standard">
      <style:text-properties officeooo:rsid="000c38e8" officeooo:paragraph-rsid="000c38e8"/>
    </style:style>
    <style:style style:name="T1" style:family="text">
      <style:text-properties officeooo:rsid="000fcea2"/>
    </style:style>
    <style:style style:name="T2" style:family="text">
      <style:text-properties officeooo:rsid="0013e2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Line</text:p>
      <text:p text:style-name="P1"><draw:frame draw:style-name="fr1" draw:name="Image6" text:anchor-type="paragraph" svg:x="1.711cm" svg:y="0.035cm" svg:width="5.26cm" svg:height="3.856cm" draw:z-index="0"><draw:image xlink:href="Pictures/100000000000062A000003DBBFE8689B.png" xlink:type="simple" xlink:show="embed" xlink:actuate="onLoad"/></draw:frame></text:p>
      <text:p text:style-name="P5">Circle</text:p>
      <text:p text:style-name="P1"><draw:frame draw:style-name="fr1" draw:name="Image5" text:anchor-type="paragraph" svg:x="1.3cm" svg:y="0.323cm" svg:width="6.227cm" svg:height="3.695cm" draw:z-index="1"><draw:image xlink:href="Pictures/100000000000062A000003DBEBB2703D.png" xlink:type="simple" xlink:show="embed" xlink:actuate="onLoad"/></draw:frame></text:p>
      <text:p text:style-name="P1"/>
      <text:p text:style-name="P1"/>
      <text:p text:style-name="P2">SquareGrid</text:p>
      <text:p text:style-name="P2"><draw:frame draw:style-name="fr1" draw:name="Image2" text:anchor-type="paragraph" svg:x="1.78cm" svg:y="0.168cm" svg:width="5.382cm" svg:height="3.286cm" draw:z-index="2"><draw:image xlink:href="Pictures/100000000000062A000003DBDF7C4F8A.png" xlink:type="simple" xlink:show="embed" xlink:actuate="onLoad"/></draw:frame></text:p>
      <text:p text:style-name="P2"/>
      <text:p text:style-name="P2"/>
      <text:p text:style-name="P2">SquareGridNoise </text:p>
      <text:p text:style-name="P2"><draw:frame draw:style-name="fr1" draw:name="Image1" text:anchor-type="paragraph" svg:x="2.051cm" svg:y="0.111cm" svg:width="5.136cm" svg:height="3.297cm" draw:z-index="3"><draw:image xlink:href="Pictures/100000000000062A000003DB6B6EC4B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>Offset</text:span>SquareGrid</text:p>
      <text:p text:style-name="P6"><draw:frame draw:style-name="fr1" draw:name="Image3" text:anchor-type="paragraph" svg:x="1.647cm" svg:y="0.123cm" svg:width="5.607cm" svg:height="4.131cm" draw:z-index="4"><draw:image xlink:href="Pictures/100000000000062A000003DBC5EDD753.png" xlink:type="simple" xlink:show="embed" xlink:actuate="onLoad"/></draw:frame></text:p>
      <text:p text:style-name="P6"><text:span text:style-name="T1">Offset</text:span>SquareGrid<text:span text:style-name="T1">Noise</text:span></text:p>
      <text:p text:style-name="P2"><draw:frame draw:style-name="fr1" draw:name="Image4" text:anchor-type="paragraph" svg:x="1.575cm" svg:y="0.437cm" svg:width="5.623cm" svg:height="3.69cm" draw:z-index="5"><draw:image xlink:href="Pictures/100000000000062A000003DBBA3E2328.png" xlink:type="simple" xlink:show="embed" xlink:actuate="onLoad"/></draw:frame></text:p>
      <text:p text:style-name="P2"/>
      <text:p text:style-name="P2"/>
      <text:p text:style-name="P7">hexagonalGrid</text:p>
      <text:p text:style-name="P2"><draw:frame draw:style-name="fr1" draw:name="Image7" text:anchor-type="paragraph" svg:x="1.334cm" svg:y="0.15cm" svg:width="6.087cm" svg:height="3.597cm" draw:z-index="6"><draw:image xlink:href="Pictures/100000000000062A000003DB9255E3E2.png" xlink:type="simple" xlink:show="embed" xlink:actuate="onLoad"/></draw:frame></text:p>
      <text:p text:style-name="P1"/>
      <text:p text:style-name="P4"><text:span text:style-name="T2">cylinder</text:span>Square </text:p>
      <text:p text:style-name="P1"><draw:frame draw:style-name="fr1" draw:name="Image8" text:anchor-type="paragraph" svg:x="1.386cm" svg:y="0.159cm" svg:width="5.304cm" svg:height="3.318cm" draw:z-index="7"><draw:image xlink:href="Pictures/100000000000062A000003DB06EEA516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4:39:29.449398610</meta:creation-date>
    <meta:generator>LibreOffice/4.2.8.2$Linux_X86_64 LibreOffice_project/420m0$Build-2</meta:generator>
    <dc:date>2017-09-18T13:39:49.460128831</dc:date>
    <meta:editing-duration>PT48M43S</meta:editing-duration>
    <meta:editing-cycles>11</meta:editing-cycles>
    <meta:document-statistic meta:table-count="0" meta:image-count="8" meta:object-count="0" meta:page-count="1" meta:paragraph-count="8" meta:word-count="8" meta:character-count="101" meta:non-whitespace-character-count="99"/>
  </office:meta>
</office:document-meta>
</file>